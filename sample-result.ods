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4.160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744in"/>
    </style:style>
    <style:style style:name="co6" style:family="table-column">
      <style:table-column-properties fo:break-before="auto" style:column-width="0.9134in"/>
    </style:style>
    <style:style style:name="co7" style:family="table-column">
      <style:table-column-properties fo:break-before="auto" style:column-width="0.8354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5547in"/>
    </style:style>
    <style:style style:name="co10" style:family="table-column">
      <style:table-column-properties fo:break-before="auto" style:column-width="0.5244in"/>
    </style:style>
    <style:style style:name="co11" style:family="table-column">
      <style:table-column-properties fo:break-before="auto" style:column-width="0.78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6634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362in" fo:break-before="page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1];[.C2])&gt;1;NOT(ISBLANK([.C2]))))" style:apply-style-name="Excel_5f_CondFormat_5f_2_5f_6_5f_1" style:base-cell-address="I.C2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1];[.C2])&gt;1;NOT(ISBLANK([.C2]))))" style:apply-style-name="Excel_5f_CondFormat_5f_2_5f_6_5f_1" style:base-cell-address="I.C2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1];[.C2])&gt;1;NOT(ISBLANK([.C2]))))" style:apply-style-name="Excel_5f_CondFormat_5f_2_5f_6_5f_1" style:base-cell-address="I.C2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1];[.C2])&gt;1;NOT(ISBLANK([.C2]))))" style:apply-style-name="Excel_5f_CondFormat_5f_2_5f_6_5f_1" style:base-cell-address="I.C2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1];[.C2])&gt;1;NOT(ISBLANK([.C2]))))" style:apply-style-name="Excel_5f_CondFormat_5f_2_5f_6_5f_1" style:base-cell-address="I.C2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1];[.C2])&gt;1;NOT(ISBLANK([.C2]))))" style:apply-style-name="Excel_5f_CondFormat_5f_2_5f_6_5f_1" style:base-cell-address="I.C2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7];[.C2])&gt;1;NOT(ISBLANK([.C2]))))" style:apply-style-name="Excel_5f_CondFormat_5f_2_5f_11_5f_1" style:base-cell-address="I.C2"/>
    </style:style>
    <style:style style:name="ce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2:.$C$47];[.C2])&gt;1;NOT(ISBLANK([.C2]))))" style:apply-style-name="Excel_5f_CondFormat_5f_2_5f_11_5f_1" style:base-cell-address="I.C2"/>
    </style:style>
    <style:style style:name="ce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48:.$C$61];[.C48])&gt;1;NOT(ISBLANK([.C48]))))" style:apply-style-name="Excel_5f_CondFormat_5f_2_5f_7_5f_1" style:base-cell-address="I.C48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48:.$C$61];[.C48])&gt;1;NOT(ISBLANK([.C48]))))" style:apply-style-name="Excel_5f_CondFormat_5f_2_5f_7_5f_1" style:base-cell-address="I.C48"/>
    </style:style>
    <style:style style:name="ce2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COUNTIF([.$C$62:.$C$62];[.C62])&gt;1;NOT(ISBLANK([.C62]))))" style:apply-style-name="Excel_5f_CondFormat_5f_2_5f_9_5f_1" style:base-cell-address="I.C62"/>
    </style:style>
    <style:style style:name="ce25" style:family="table-cell" style:parent-style-name="Default">
      <style:table-cell-properties fo:padding="0.028in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8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&quot;" style:apply-style-name="Excel_5f_CondFormat_5f_2_5f_3_5f_1" style:base-cell-address="I.D2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  <style:map style:condition="cell-content()&gt;9" style:apply-style-name="Excel_5f_CondFormat_5f_2_5f_5_5f_1" style:base-cell-address="I.L2"/>
    </style:style>
    <style:style style:name="ce4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  <style:map style:condition="cell-content()&gt;9" style:apply-style-name="Excel_5f_CondFormat_5f_2_5f_5_5f_1" style:base-cell-address="I.L2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I" table:style-name="ta1" table:print-ranges="I.A1:I.O62">
        <table:table-column table:style-name="co1" table:default-cell-style-name="ce5"/>
        <table:table-column table:style-name="co2" table:default-cell-style-name="ce12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5" table:default-cell-style-name="ce25"/>
        <table:table-column table:style-name="co7" table:default-cell-style-name="ce25"/>
        <table:table-column table:style-name="co5" table:default-cell-style-name="ce25"/>
        <table:table-column table:style-name="co8" table:default-cell-style-name="ce25"/>
        <table:table-column table:style-name="co6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visibility="collapse" table:default-cell-style-name="ce25"/>
        <table:table-column table:style-name="co11" table:number-columns-repeated="16369" table:default-cell-style-name="Default"/>
        <table:table-header-rows>
          <table:table-row table:style-name="ro1">
            <table:table-cell table:style-name="ce46" office:value-type="string" calcext:value-type="string">
              <text:p>S.No.</text:p>
            </table:table-cell>
            <table:table-cell table:style-name="ce50" office:value-type="string" calcext:value-type="string">
              <text:p>Roll No.</text:p>
            </table:table-cell>
            <table:table-cell table:style-name="ce57" office:value-type="string" calcext:value-type="string">
              <text:p>Name of the student</text:p>
            </table:table-cell>
            <table:table-cell table:style-name="ce70" office:value-type="string" calcext:value-type="string">
              <text:p>ENGG. MAT-II</text:p>
            </table:table-cell>
            <table:table-cell table:style-name="ce74" office:value-type="string" calcext:value-type="string">
              <text:p>ENGG. PHY.</text:p>
            </table:table-cell>
            <table:table-cell table:style-name="ce74" office:value-type="string" calcext:value-type="string">
              <text:p>DS'C'</text:p>
            </table:table-cell>
            <table:table-cell table:style-name="ce77" office:value-type="string" calcext:value-type="string">
              <text:p>ENG</text:p>
            </table:table-cell>
            <table:table-cell table:style-name="ce74" office:value-type="string" calcext:value-type="string">
              <text:p>ENGG. GRA.</text:p>
            </table:table-cell>
            <table:table-cell table:style-name="ce80" office:value-type="string" calcext:value-type="string">
              <text:p>PHY LAB</text:p>
            </table:table-cell>
            <table:table-cell table:style-name="ce80" office:value-type="string" calcext:value-type="string">
              <text:p>DS LAB</text:p>
            </table:table-cell>
            <table:table-cell table:style-name="ce80" office:value-type="string" calcext:value-type="string">
              <text:p>IT WS LAB</text:p>
            </table:table-cell>
            <table:table-cell table:style-name="ce84" office:value-type="string" calcext:value-type="string">
              <text:p>SGPA</text:p>
            </table:table-cell>
            <table:table-cell table:style-name="ce87" office:value-type="string" calcext:value-type="string">
              <text:p>CGPA</text:p>
            </table:table-cell>
            <table:table-cell table:style-name="Default"/>
            <table:table-cell table:number-columns-repeated="16369"/>
          </table:table-row>
        </table:table-header-rows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251412001" calcext:value-type="float">
            <text:p>5251412001</text:p>
          </table:table-cell>
          <table:table-cell table:style-name="ce14" office:value-type="string" calcext:value-type="string">
            <text:p>ALAGARA SARATH KUMAR</text:p>
          </table:table-cell>
          <table:table-cell table:style-name="ce27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41" table:formula="of:=['file:///home/gvp/Downloads/Result%20Analysis%202025-26%20B.Tech%20I%20Year%20I%20Sem%20CSM-A.xls'#$SGPA.AM8]" office:value-type="float" office:value="0" calcext:value-type="float">
            <text:p>0.00</text:p>
          </table:table-cell>
          <table:table-cell table:style-name="ce44" table:formula="of:=['file:///home/gvp/Downloads/Result%20Analysis%202025-26%20B.Tech%20I%20Year%20I%20Sem%20CSM-A.xls'#$SGPA.AL8]" office:value-type="float" office:value="5.76923076923077" calcext:value-type="float">
            <text:p>5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5251412002" calcext:value-type="float">
            <text:p>5251412002</text:p>
          </table:table-cell>
          <table:table-cell table:style-name="ce15" office:value-type="string" calcext:value-type="string">
            <text:p>ALLAMRAJU INDIRA MADHU HASINI</text:p>
          </table:table-cell>
          <table:table-cell table:style-name="ce28" office:value-type="string" calcext:value-type="string">
            <text:p>A+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9]" office:value-type="float" office:value="9.38461538461539" calcext:value-type="float">
            <text:p>9.38</text:p>
          </table:table-cell>
          <table:table-cell table:style-name="ce45" table:formula="of:=['file:///home/gvp/Downloads/Result%20Analysis%202025-26%20B.Tech%20I%20Year%20I%20Sem%20CSM-A.xls'#$SGPA.AL9]" office:value-type="float" office:value="9.38461538461539" calcext:value-type="float">
            <text:p>9.3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5251412003" calcext:value-type="float">
            <text:p>5251412003</text:p>
          </table:table-cell>
          <table:table-cell table:style-name="ce15" office:value-type="string" calcext:value-type="string">
            <text:p>ARIPAKA NAGAKUSUMA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10]" office:value-type="float" office:value="9.23076923076923" calcext:value-type="float">
            <text:p>9.23</text:p>
          </table:table-cell>
          <table:table-cell table:style-name="ce45" table:formula="of:=['file:///home/gvp/Downloads/Result%20Analysis%202025-26%20B.Tech%20I%20Year%20I%20Sem%20CSM-A.xls'#$SGPA.AL10]" office:value-type="float" office:value="9.23076923076923" calcext:value-type="float">
            <text:p>9.23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5251412004" calcext:value-type="float">
            <text:p>5251412004</text:p>
          </table:table-cell>
          <table:table-cell table:style-name="ce15" office:value-type="string" calcext:value-type="string">
            <text:p>BANDARU LAKSHMI KALYAN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11]" office:value-type="float" office:value="8.30769230769231" calcext:value-type="float">
            <text:p>8.31</text:p>
          </table:table-cell>
          <table:table-cell table:style-name="ce45" table:formula="of:=['file:///home/gvp/Downloads/Result%20Analysis%202025-26%20B.Tech%20I%20Year%20I%20Sem%20CSM-A.xls'#$SGPA.AL11]" office:value-type="float" office:value="8.30769230769231" calcext:value-type="float">
            <text:p>8.31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5251412005" calcext:value-type="float">
            <text:p>5251412005</text:p>
          </table:table-cell>
          <table:table-cell table:style-name="ce15" office:value-type="string" calcext:value-type="string">
            <text:p>BANGARU AKHILA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12]" office:value-type="float" office:value="8.15384615384615" calcext:value-type="float">
            <text:p>8.15</text:p>
          </table:table-cell>
          <table:table-cell table:style-name="ce45" table:formula="of:=['file:///home/gvp/Downloads/Result%20Analysis%202025-26%20B.Tech%20I%20Year%20I%20Sem%20CSM-A.xls'#$SGPA.AL12]" office:value-type="float" office:value="8.15384615384615" calcext:value-type="float">
            <text:p>8.1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float" office:value="5251412006" calcext:value-type="float">
            <text:p>5251412006</text:p>
          </table:table-cell>
          <table:table-cell table:style-name="ce16" office:value-type="string" calcext:value-type="string">
            <text:p>BARATAM SAMEERA</text:p>
          </table:table-cell>
          <table:table-cell table:style-name="ce29" office:value-type="string" calcext:value-type="string">
            <text:p>AB</text:p>
          </table:table-cell>
          <table:table-cell table:number-columns-repeated="6" table:style-name="ce32" office:value-type="string" calcext:value-type="string">
            <text:p>AB</text:p>
          </table:table-cell>
          <table:table-cell table:style-name="ce39" office:value-type="string" calcext:value-type="string">
            <text:p>AB</text:p>
          </table:table-cell>
          <table:table-cell table:style-name="ce42" table:formula="of:=['file:///home/gvp/Downloads/Result%20Analysis%202025-26%20B.Tech%20I%20Year%20I%20Sem%20CSM-A.xls'#$SGPA.AM13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13]" office:value-type="float" office:value="0" calcext:value-type="float">
            <text:p>0.00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5251412007" calcext:value-type="float">
            <text:p>5251412007</text:p>
          </table:table-cell>
          <table:table-cell table:style-name="ce15" office:value-type="string" calcext:value-type="string">
            <text:p>BATTULA HIMAVANTH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14]" office:value-type="float" office:value="7.38461538461539" calcext:value-type="float">
            <text:p>7.38</text:p>
          </table:table-cell>
          <table:table-cell table:style-name="ce45" table:formula="of:=['file:///home/gvp/Downloads/Result%20Analysis%202025-26%20B.Tech%20I%20Year%20I%20Sem%20CSM-A.xls'#$SGPA.AL14]" office:value-type="float" office:value="7.38461538461539" calcext:value-type="float">
            <text:p>7.3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5251412008" calcext:value-type="float">
            <text:p>5251412008</text:p>
          </table:table-cell>
          <table:table-cell table:style-name="ce15" office:value-type="string" calcext:value-type="string">
            <text:p>BIKKINA SAI KAVYA VARSHIN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15]" office:value-type="float" office:value="8.84615384615385" calcext:value-type="float">
            <text:p>8.85</text:p>
          </table:table-cell>
          <table:table-cell table:style-name="ce45" table:formula="of:=['file:///home/gvp/Downloads/Result%20Analysis%202025-26%20B.Tech%20I%20Year%20I%20Sem%20CSM-A.xls'#$SGPA.AL15]" office:value-type="float" office:value="8.84615384615385" calcext:value-type="float">
            <text:p>8.8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5251412009" calcext:value-type="float">
            <text:p>5251412009</text:p>
          </table:table-cell>
          <table:table-cell table:style-name="ce15" office:value-type="string" calcext:value-type="string">
            <text:p>BOBBARA DURGA PRASAD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16]" office:value-type="float" office:value="8.07692307692308" calcext:value-type="float">
            <text:p>8.08</text:p>
          </table:table-cell>
          <table:table-cell table:style-name="ce45" table:formula="of:=['file:///home/gvp/Downloads/Result%20Analysis%202025-26%20B.Tech%20I%20Year%20I%20Sem%20CSM-A.xls'#$SGPA.AL16]" office:value-type="float" office:value="8.07692307692308" calcext:value-type="float">
            <text:p>8.0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5251412010" calcext:value-type="float">
            <text:p>5251412010</text:p>
          </table:table-cell>
          <table:table-cell table:style-name="ce15" office:value-type="string" calcext:value-type="string">
            <text:p>BOKAM JAGAN</text:p>
          </table:table-cell>
          <table:table-cell table:style-name="ce28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17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17]" office:value-type="float" office:value="3.76923076923077" calcext:value-type="float">
            <text:p>3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5251412011" calcext:value-type="float">
            <text:p>5251412011</text:p>
          </table:table-cell>
          <table:table-cell table:style-name="ce16" office:value-type="string" calcext:value-type="string">
            <text:p>BONI ROHITH</text:p>
          </table:table-cell>
          <table:table-cell table:style-name="ce28" office:value-type="string" calcext:value-type="string">
            <text:p>F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5" office:value-type="string" calcext:value-type="string">
            <text:p>F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18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18]" office:value-type="float" office:value="3.30769230769231" calcext:value-type="float">
            <text:p>3.31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float" office:value="5251412012" calcext:value-type="float">
            <text:p>5251412012</text:p>
          </table:table-cell>
          <table:table-cell table:style-name="ce15" office:value-type="string" calcext:value-type="string">
            <text:p>BOTHSA HASIN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19]" office:value-type="float" office:value="8.84615384615385" calcext:value-type="float">
            <text:p>8.85</text:p>
          </table:table-cell>
          <table:table-cell table:style-name="ce45" table:formula="of:=['file:///home/gvp/Downloads/Result%20Analysis%202025-26%20B.Tech%20I%20Year%20I%20Sem%20CSM-A.xls'#$SGPA.AL19]" office:value-type="float" office:value="8.84615384615385" calcext:value-type="float">
            <text:p>8.8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5251412013" calcext:value-type="float">
            <text:p>5251412013</text:p>
          </table:table-cell>
          <table:table-cell table:style-name="ce15" office:value-type="string" calcext:value-type="string">
            <text:p>BUKKA TANUJA</text:p>
          </table:table-cell>
          <table:table-cell table:style-name="ce28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A+</text:p>
          </table:table-cell>
          <table:table-cell table:style-name="ce35" office:value-type="string" calcext:value-type="string">
            <text:p>A+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20]" office:value-type="float" office:value="9.61538461538462" calcext:value-type="float">
            <text:p>9.62</text:p>
          </table:table-cell>
          <table:table-cell table:style-name="ce45" table:formula="of:=['file:///home/gvp/Downloads/Result%20Analysis%202025-26%20B.Tech%20I%20Year%20I%20Sem%20CSM-A.xls'#$SGPA.AL20]" office:value-type="float" office:value="9.61538461538462" calcext:value-type="float">
            <text:p>9.62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5251412014" calcext:value-type="float">
            <text:p>5251412014</text:p>
          </table:table-cell>
          <table:table-cell table:style-name="ce15" office:value-type="string" calcext:value-type="string">
            <text:p>BURLE DILEEP KUMAR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21]" office:value-type="float" office:value="8.61538461538462" calcext:value-type="float">
            <text:p>8.62</text:p>
          </table:table-cell>
          <table:table-cell table:style-name="ce45" table:formula="of:=['file:///home/gvp/Downloads/Result%20Analysis%202025-26%20B.Tech%20I%20Year%20I%20Sem%20CSM-A.xls'#$SGPA.AL21]" office:value-type="float" office:value="8.61538461538462" calcext:value-type="float">
            <text:p>8.62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float" office:value="5251412015" calcext:value-type="float">
            <text:p>5251412015</text:p>
          </table:table-cell>
          <table:table-cell table:style-name="ce15" office:value-type="string" calcext:value-type="string">
            <text:p>CHELIKANI KARTHIK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22]" office:value-type="float" office:value="7.69230769230769" calcext:value-type="float">
            <text:p>7.69</text:p>
          </table:table-cell>
          <table:table-cell table:style-name="ce45" table:formula="of:=['file:///home/gvp/Downloads/Result%20Analysis%202025-26%20B.Tech%20I%20Year%20I%20Sem%20CSM-A.xls'#$SGPA.AL22]" office:value-type="float" office:value="7.69230769230769" calcext:value-type="float">
            <text:p>7.69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5251412016" calcext:value-type="float">
            <text:p>5251412016</text:p>
          </table:table-cell>
          <table:table-cell table:style-name="ce15" office:value-type="string" calcext:value-type="string">
            <text:p>CHEVAKULA SHAMIL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23]" office:value-type="float" office:value="8.23076923076923" calcext:value-type="float">
            <text:p>8.23</text:p>
          </table:table-cell>
          <table:table-cell table:style-name="ce45" table:formula="of:=['file:///home/gvp/Downloads/Result%20Analysis%202025-26%20B.Tech%20I%20Year%20I%20Sem%20CSM-A.xls'#$SGPA.AL23]" office:value-type="float" office:value="8.23076923076923" calcext:value-type="float">
            <text:p>8.23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float" office:value="5251412017" calcext:value-type="float">
            <text:p>5251412017</text:p>
          </table:table-cell>
          <table:table-cell table:style-name="ce15" office:value-type="string" calcext:value-type="string">
            <text:p>CHINTALA SURYA RAJ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24]" office:value-type="float" office:value="7.92307692307692" calcext:value-type="float">
            <text:p>7.92</text:p>
          </table:table-cell>
          <table:table-cell table:style-name="ce45" table:formula="of:=['file:///home/gvp/Downloads/Result%20Analysis%202025-26%20B.Tech%20I%20Year%20I%20Sem%20CSM-A.xls'#$SGPA.AL24]" office:value-type="float" office:value="7.92307692307692" calcext:value-type="float">
            <text:p>7.92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float" office:value="5251412018" calcext:value-type="float">
            <text:p>5251412018</text:p>
          </table:table-cell>
          <table:table-cell table:style-name="ce15" office:value-type="string" calcext:value-type="string">
            <text:p>CHOWDUVADA ANIL KUMAR</text:p>
          </table:table-cell>
          <table:table-cell table:style-name="ce28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25]" office:value-type="float" office:value="6.76923076923077" calcext:value-type="float">
            <text:p>6.77</text:p>
          </table:table-cell>
          <table:table-cell table:style-name="ce45" table:formula="of:=['file:///home/gvp/Downloads/Result%20Analysis%202025-26%20B.Tech%20I%20Year%20I%20Sem%20CSM-A.xls'#$SGPA.AL25]" office:value-type="float" office:value="6.76923076923077" calcext:value-type="float">
            <text:p>6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float" office:value="5251412019" calcext:value-type="float">
            <text:p>5251412019</text:p>
          </table:table-cell>
          <table:table-cell table:style-name="ce15" office:value-type="string" calcext:value-type="string">
            <text:p>DASARI RATHIKUMARI</text:p>
          </table:table-cell>
          <table:table-cell table:style-name="ce28" office:value-type="string" calcext:value-type="string">
            <text:p>E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26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26]" office:value-type="float" office:value="3.76923076923077" calcext:value-type="float">
            <text:p>3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float" office:value="5251412020" calcext:value-type="float">
            <text:p>5251412020</text:p>
          </table:table-cell>
          <table:table-cell table:style-name="ce15" office:value-type="string" calcext:value-type="string">
            <text:p>DASIREDDY MAHA LAKSHM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27]" office:value-type="float" office:value="8.76923076923077" calcext:value-type="float">
            <text:p>8.77</text:p>
          </table:table-cell>
          <table:table-cell table:style-name="ce45" table:formula="of:=['file:///home/gvp/Downloads/Result%20Analysis%202025-26%20B.Tech%20I%20Year%20I%20Sem%20CSM-A.xls'#$SGPA.AL27]" office:value-type="float" office:value="8.76923076923077" calcext:value-type="float">
            <text:p>8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float" office:value="5251412021" calcext:value-type="float">
            <text:p>5251412021</text:p>
          </table:table-cell>
          <table:table-cell table:style-name="ce15" office:value-type="string" calcext:value-type="string">
            <text:p>DEEPALA DAISY HEPSIBA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28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28]" office:value-type="float" office:value="6.92307692307692" calcext:value-type="float">
            <text:p>6.92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float" office:value="5251412022" calcext:value-type="float">
            <text:p>5251412022</text:p>
          </table:table-cell>
          <table:table-cell table:style-name="ce15" office:value-type="string" calcext:value-type="string">
            <text:p>DEVAVARAPU RUCHITHA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29]" office:value-type="float" office:value="9.15384615384615" calcext:value-type="float">
            <text:p>9.15</text:p>
          </table:table-cell>
          <table:table-cell table:style-name="ce45" table:formula="of:=['file:///home/gvp/Downloads/Result%20Analysis%202025-26%20B.Tech%20I%20Year%20I%20Sem%20CSM-A.xls'#$SGPA.AL29]" office:value-type="float" office:value="9.15384615384615" calcext:value-type="float">
            <text:p>9.1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float" office:value="5251412023" calcext:value-type="float">
            <text:p>5251412023</text:p>
          </table:table-cell>
          <table:table-cell table:style-name="ce15" office:value-type="string" calcext:value-type="string">
            <text:p>DHARMIREDDI NISHANTH</text:p>
          </table:table-cell>
          <table:table-cell table:style-name="ce28" office:value-type="string" calcext:value-type="string">
            <text:p>F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5" office:value-type="string" calcext:value-type="string">
            <text:p>D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30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30]" office:value-type="float" office:value="2.76923076923077" calcext:value-type="float">
            <text:p>2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float" office:value="5251412024" calcext:value-type="float">
            <text:p>5251412024</text:p>
          </table:table-cell>
          <table:table-cell table:style-name="ce15" office:value-type="string" calcext:value-type="string">
            <text:p>DIGUMARTHY PRANEETH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31]" office:value-type="float" office:value="7.46153846153846" calcext:value-type="float">
            <text:p>7.46</text:p>
          </table:table-cell>
          <table:table-cell table:style-name="ce45" table:formula="of:=['file:///home/gvp/Downloads/Result%20Analysis%202025-26%20B.Tech%20I%20Year%20I%20Sem%20CSM-A.xls'#$SGPA.AL31]" office:value-type="float" office:value="7.46153846153846" calcext:value-type="float">
            <text:p>7.46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float" office:value="5251412025" calcext:value-type="float">
            <text:p>5251412025</text:p>
          </table:table-cell>
          <table:table-cell table:style-name="ce16" office:value-type="string" calcext:value-type="string">
            <text:p>DONGA SAI VAMSI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32]" office:value-type="float" office:value="7.46153846153846" calcext:value-type="float">
            <text:p>7.46</text:p>
          </table:table-cell>
          <table:table-cell table:style-name="ce45" table:formula="of:=['file:///home/gvp/Downloads/Result%20Analysis%202025-26%20B.Tech%20I%20Year%20I%20Sem%20CSM-A.xls'#$SGPA.AL32]" office:value-type="float" office:value="7.46153846153846" calcext:value-type="float">
            <text:p>7.46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float" office:value="5251412026" calcext:value-type="float">
            <text:p>5251412026</text:p>
          </table:table-cell>
          <table:table-cell table:style-name="ce15" office:value-type="string" calcext:value-type="string">
            <text:p>DONTHALA NANDIN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33]" office:value-type="float" office:value="8.38461538461539" calcext:value-type="float">
            <text:p>8.38</text:p>
          </table:table-cell>
          <table:table-cell table:style-name="ce45" table:formula="of:=['file:///home/gvp/Downloads/Result%20Analysis%202025-26%20B.Tech%20I%20Year%20I%20Sem%20CSM-A.xls'#$SGPA.AL33]" office:value-type="float" office:value="8.38461538461539" calcext:value-type="float">
            <text:p>8.3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float" office:value="5251412027" calcext:value-type="float">
            <text:p>5251412027</text:p>
          </table:table-cell>
          <table:table-cell table:style-name="ce15" office:value-type="string" calcext:value-type="string">
            <text:p>DUVVURI V SIVA SAI SATYANARAYANA MURTHY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34]" office:value-type="float" office:value="8.38461538461539" calcext:value-type="float">
            <text:p>8.38</text:p>
          </table:table-cell>
          <table:table-cell table:style-name="ce45" table:formula="of:=['file:///home/gvp/Downloads/Result%20Analysis%202025-26%20B.Tech%20I%20Year%20I%20Sem%20CSM-A.xls'#$SGPA.AL34]" office:value-type="float" office:value="8.38461538461539" calcext:value-type="float">
            <text:p>8.3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float" office:value="5251412028" calcext:value-type="float">
            <text:p>5251412028</text:p>
          </table:table-cell>
          <table:table-cell table:style-name="ce15" office:value-type="string" calcext:value-type="string">
            <text:p>DWARAPUREDDY THANMAI SAI SR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35]" office:value-type="float" office:value="8.69230769230769" calcext:value-type="float">
            <text:p>8.69</text:p>
          </table:table-cell>
          <table:table-cell table:style-name="ce45" table:formula="of:=['file:///home/gvp/Downloads/Result%20Analysis%202025-26%20B.Tech%20I%20Year%20I%20Sem%20CSM-A.xls'#$SGPA.AL35]" office:value-type="float" office:value="8.69230769230769" calcext:value-type="float">
            <text:p>8.69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float" office:value="5251412029" calcext:value-type="float">
            <text:p>5251412029</text:p>
          </table:table-cell>
          <table:table-cell table:style-name="ce16" office:value-type="string" calcext:value-type="string">
            <text:p>GANTI SAI ADITYA</text:p>
          </table:table-cell>
          <table:table-cell table:style-name="ce28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36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36]" office:value-type="float" office:value="6.15384615384615" calcext:value-type="float">
            <text:p>6.1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5251412030" calcext:value-type="float">
            <text:p>5251412030</text:p>
          </table:table-cell>
          <table:table-cell table:style-name="ce16" office:value-type="string" calcext:value-type="string">
            <text:p>GEETESH CHARAN MALLUVALASA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37]" office:value-type="float" office:value="7.92307692307692" calcext:value-type="float">
            <text:p>7.92</text:p>
          </table:table-cell>
          <table:table-cell table:style-name="ce45" table:formula="of:=['file:///home/gvp/Downloads/Result%20Analysis%202025-26%20B.Tech%20I%20Year%20I%20Sem%20CSM-A.xls'#$SGPA.AL37]" office:value-type="float" office:value="7.92307692307692" calcext:value-type="float">
            <text:p>7.92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 office:value-type="float" office:value="5251412031" calcext:value-type="float">
            <text:p>5251412031</text:p>
          </table:table-cell>
          <table:table-cell table:style-name="ce17" office:value-type="string" calcext:value-type="string">
            <text:p>GNANADEEP BALE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38]" office:value-type="float" office:value="8.76923076923077" calcext:value-type="float">
            <text:p>8.77</text:p>
          </table:table-cell>
          <table:table-cell table:style-name="ce45" table:formula="of:=['file:///home/gvp/Downloads/Result%20Analysis%202025-26%20B.Tech%20I%20Year%20I%20Sem%20CSM-A.xls'#$SGPA.AL38]" office:value-type="float" office:value="8.76923076923077" calcext:value-type="float">
            <text:p>8.77</text:p>
          </table:table-cell>
          <table:table-cell table:style-name="Default"/>
          <table:table-cell table:number-columns-repeated="16369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8" office:value-type="float" office:value="5251412032" calcext:value-type="float">
            <text:p>5251412032</text:p>
          </table:table-cell>
          <table:table-cell table:style-name="ce14" office:value-type="string" calcext:value-type="string">
            <text:p>GORLE JYOTHSNA</text:p>
          </table:table-cell>
          <table:table-cell table:style-name="ce28" office:value-type="string" calcext:value-type="string">
            <text:p>A+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39]" office:value-type="float" office:value="9.46153846153846" calcext:value-type="float">
            <text:p>9.46</text:p>
          </table:table-cell>
          <table:table-cell table:style-name="ce45" table:formula="of:=['file:///home/gvp/Downloads/Result%20Analysis%202025-26%20B.Tech%20I%20Year%20I%20Sem%20CSM-A.xls'#$SGPA.AL39]" office:value-type="float" office:value="9.46153846153846" calcext:value-type="float">
            <text:p>9.46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office:value-type="float" office:value="5251412033" calcext:value-type="float">
            <text:p>5251412033</text:p>
          </table:table-cell>
          <table:table-cell table:style-name="ce18" office:value-type="string" calcext:value-type="string">
            <text:p>GUDALA VENKATA VARSHITHA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E</text:p>
          </table:table-cell>
          <table:table-cell table:style-name="ce35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40]" office:value-type="float" office:value="6.76923076923077" calcext:value-type="float">
            <text:p>6.77</text:p>
          </table:table-cell>
          <table:table-cell table:style-name="ce45" table:formula="of:=['file:///home/gvp/Downloads/Result%20Analysis%202025-26%20B.Tech%20I%20Year%20I%20Sem%20CSM-A.xls'#$SGPA.AL40]" office:value-type="float" office:value="6.76923076923077" calcext:value-type="float">
            <text:p>6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10" office:value-type="float" office:value="5251412034" calcext:value-type="float">
            <text:p>5251412034</text:p>
          </table:table-cell>
          <table:table-cell table:style-name="ce15" office:value-type="string" calcext:value-type="string">
            <text:p>HASINI TEEGALA</text:p>
          </table:table-cell>
          <table:table-cell table:style-name="ce28" office:value-type="string" calcext:value-type="string">
            <text:p>A+</text:p>
          </table:table-cell>
          <table:table-cell table:number-columns-repeated="2" table:style-name="ce32" office:value-type="string" calcext:value-type="string">
            <text:p>A+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41]" office:value-type="float" office:value="9.46153846153846" calcext:value-type="float">
            <text:p>9.46</text:p>
          </table:table-cell>
          <table:table-cell table:style-name="ce45" table:formula="of:=['file:///home/gvp/Downloads/Result%20Analysis%202025-26%20B.Tech%20I%20Year%20I%20Sem%20CSM-A.xls'#$SGPA.AL41]" office:value-type="float" office:value="9.46153846153846" calcext:value-type="float">
            <text:p>9.46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10" office:value-type="float" office:value="5251412035" calcext:value-type="float">
            <text:p>5251412035</text:p>
          </table:table-cell>
          <table:table-cell table:style-name="ce15" office:value-type="string" calcext:value-type="string">
            <text:p>INAPAKURTHI BHARATH</text:p>
          </table:table-cell>
          <table:table-cell table:style-name="ce28" office:value-type="string" calcext:value-type="string">
            <text:p>A+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42]" office:value-type="float" office:value="8.53846153846154" calcext:value-type="float">
            <text:p>8.54</text:p>
          </table:table-cell>
          <table:table-cell table:style-name="ce45" table:formula="of:=['file:///home/gvp/Downloads/Result%20Analysis%202025-26%20B.Tech%20I%20Year%20I%20Sem%20CSM-A.xls'#$SGPA.AL42]" office:value-type="float" office:value="8.53846153846154" calcext:value-type="float">
            <text:p>8.54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10" office:value-type="float" office:value="5251412036" calcext:value-type="float">
            <text:p>5251412036</text:p>
          </table:table-cell>
          <table:table-cell table:style-name="ce19" office:value-type="string" calcext:value-type="string">
            <text:p>INTI CHARAN SAI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43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43]" office:value-type="float" office:value="6.92307692307692" calcext:value-type="float">
            <text:p>6.92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10" office:value-type="float" office:value="5251412037" calcext:value-type="float">
            <text:p>5251412037</text:p>
          </table:table-cell>
          <table:table-cell table:style-name="ce19" office:value-type="string" calcext:value-type="string">
            <text:p>IRIGINENI <text:s/>RAGHUVARDHAN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44]" office:value-type="float" office:value="7.92307692307692" calcext:value-type="float">
            <text:p>7.92</text:p>
          </table:table-cell>
          <table:table-cell table:style-name="ce45" table:formula="of:=['file:///home/gvp/Downloads/Result%20Analysis%202025-26%20B.Tech%20I%20Year%20I%20Sem%20CSM-A.xls'#$SGPA.AL44]" office:value-type="float" office:value="7.92307692307692" calcext:value-type="float">
            <text:p>7.92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10" office:value-type="float" office:value="5251412038" calcext:value-type="float">
            <text:p>5251412038</text:p>
          </table:table-cell>
          <table:table-cell table:style-name="ce15" office:value-type="string" calcext:value-type="string">
            <text:p>JAKKAMPUDI ANIL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45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45]" office:value-type="float" office:value="6.38461538461539" calcext:value-type="float">
            <text:p>6.3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10" office:value-type="float" office:value="5251412039" calcext:value-type="float">
            <text:p>5251412039</text:p>
          </table:table-cell>
          <table:table-cell table:style-name="ce15" office:value-type="string" calcext:value-type="string">
            <text:p>JAKKIREDDY SAI VIKAS REDDY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46]" office:value-type="float" office:value="8.07692307692308" calcext:value-type="float">
            <text:p>8.08</text:p>
          </table:table-cell>
          <table:table-cell table:style-name="ce45" table:formula="of:=['file:///home/gvp/Downloads/Result%20Analysis%202025-26%20B.Tech%20I%20Year%20I%20Sem%20CSM-A.xls'#$SGPA.AL46]" office:value-type="float" office:value="8.07692307692308" calcext:value-type="float">
            <text:p>8.0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10" office:value-type="float" office:value="5251412040" calcext:value-type="float">
            <text:p>5251412040</text:p>
          </table:table-cell>
          <table:table-cell table:style-name="ce15" office:value-type="string" calcext:value-type="string">
            <text:p>JANNI DHIRAJ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47]" office:value-type="float" office:value="8.46153846153846" calcext:value-type="float">
            <text:p>8.46</text:p>
          </table:table-cell>
          <table:table-cell table:style-name="ce45" table:formula="of:=['file:///home/gvp/Downloads/Result%20Analysis%202025-26%20B.Tech%20I%20Year%20I%20Sem%20CSM-A.xls'#$SGPA.AL47]" office:value-type="float" office:value="8.46153846153846" calcext:value-type="float">
            <text:p>8.46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10" office:value-type="float" office:value="5251412041" calcext:value-type="float">
            <text:p>5251412041</text:p>
          </table:table-cell>
          <table:table-cell table:style-name="ce20" office:value-type="string" calcext:value-type="string">
            <text:p>JONNADA AKHIL</text:p>
          </table:table-cell>
          <table:table-cell table:style-name="ce28" office:value-type="string" calcext:value-type="string">
            <text:p>A+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48]" office:value-type="float" office:value="9.23076923076923" calcext:value-type="float">
            <text:p>9.23</text:p>
          </table:table-cell>
          <table:table-cell table:style-name="ce45" table:formula="of:=['file:///home/gvp/Downloads/Result%20Analysis%202025-26%20B.Tech%20I%20Year%20I%20Sem%20CSM-A.xls'#$SGPA.AL48]" office:value-type="float" office:value="9.23076923076923" calcext:value-type="float">
            <text:p>9.23</text:p>
          </table:table-cell>
          <table:table-cell table:style-name="Default"/>
          <table:table-cell table:number-columns-repeated="16369"/>
        </table:table-row>
        <table:table-row table:style-name="ro5">
          <table:table-cell table:style-name="ce4" office:value-type="float" office:value="42" calcext:value-type="float">
            <text:p>42</text:p>
          </table:table-cell>
          <table:table-cell table:style-name="ce10" office:value-type="float" office:value="5251412042" calcext:value-type="float">
            <text:p>5251412042</text:p>
          </table:table-cell>
          <table:table-cell table:style-name="ce20" office:value-type="string" calcext:value-type="string">
            <text:p>KAGITHALA RAMA VENKATA SAI VATHSAL REDDY</text:p>
          </table:table-cell>
          <table:table-cell table:style-name="ce28" office:value-type="string" calcext:value-type="string">
            <text:p>A+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49]" office:value-type="float" office:value="8.53846153846154" calcext:value-type="float">
            <text:p>8.54</text:p>
          </table:table-cell>
          <table:table-cell table:style-name="ce45" table:formula="of:=['file:///home/gvp/Downloads/Result%20Analysis%202025-26%20B.Tech%20I%20Year%20I%20Sem%20CSM-A.xls'#$SGPA.AL49]" office:value-type="float" office:value="8.53846153846154" calcext:value-type="float">
            <text:p>8.54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10" office:value-type="float" office:value="5251412043" calcext:value-type="float">
            <text:p>5251412043</text:p>
          </table:table-cell>
          <table:table-cell table:style-name="ce21" office:value-type="string" calcext:value-type="string">
            <text:p>KALISIPUDI ROHIT SARMA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50]" office:value-type="float" office:value="8.53846153846154" calcext:value-type="float">
            <text:p>8.54</text:p>
          </table:table-cell>
          <table:table-cell table:style-name="ce45" table:formula="of:=['file:///home/gvp/Downloads/Result%20Analysis%202025-26%20B.Tech%20I%20Year%20I%20Sem%20CSM-A.xls'#$SGPA.AL50]" office:value-type="float" office:value="8.53846153846154" calcext:value-type="float">
            <text:p>8.54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10" office:value-type="float" office:value="5251412044" calcext:value-type="float">
            <text:p>5251412044</text:p>
          </table:table-cell>
          <table:table-cell table:style-name="ce20" office:value-type="string" calcext:value-type="string">
            <text:p>KALLA VENKATA SHANMUKHA PRIYA</text:p>
          </table:table-cell>
          <table:table-cell table:style-name="ce28" office:value-type="string" calcext:value-type="string">
            <text:p>A+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51]" office:value-type="float" office:value="8.84615384615385" calcext:value-type="float">
            <text:p>8.85</text:p>
          </table:table-cell>
          <table:table-cell table:style-name="ce45" table:formula="of:=['file:///home/gvp/Downloads/Result%20Analysis%202025-26%20B.Tech%20I%20Year%20I%20Sem%20CSM-A.xls'#$SGPA.AL51]" office:value-type="float" office:value="8.84615384615385" calcext:value-type="float">
            <text:p>8.8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10" office:value-type="float" office:value="5251412045" calcext:value-type="float">
            <text:p>5251412045</text:p>
          </table:table-cell>
          <table:table-cell table:style-name="ce20" office:value-type="string" calcext:value-type="string">
            <text:p>KAMAVARAPU KEERTHANA</text:p>
          </table:table-cell>
          <table:table-cell table:style-name="ce28" office:value-type="string" calcext:value-type="string">
            <text:p>A+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52]" office:value-type="float" office:value="8.84615384615385" calcext:value-type="float">
            <text:p>8.85</text:p>
          </table:table-cell>
          <table:table-cell table:style-name="ce45" table:formula="of:=['file:///home/gvp/Downloads/Result%20Analysis%202025-26%20B.Tech%20I%20Year%20I%20Sem%20CSM-A.xls'#$SGPA.AL52]" office:value-type="float" office:value="8.84615384615385" calcext:value-type="float">
            <text:p>8.8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10" office:value-type="float" office:value="5251412046" calcext:value-type="float">
            <text:p>5251412046</text:p>
          </table:table-cell>
          <table:table-cell table:style-name="ce20" office:value-type="string" calcext:value-type="string">
            <text:p>KANDIBOYINA HARSHITH RAM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53]" office:value-type="float" office:value="7.38461538461539" calcext:value-type="float">
            <text:p>7.38</text:p>
          </table:table-cell>
          <table:table-cell table:style-name="ce45" table:formula="of:=['file:///home/gvp/Downloads/Result%20Analysis%202025-26%20B.Tech%20I%20Year%20I%20Sem%20CSM-A.xls'#$SGPA.AL53]" office:value-type="float" office:value="7.38461538461539" calcext:value-type="float">
            <text:p>7.3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10" office:value-type="float" office:value="5251412047" calcext:value-type="float">
            <text:p>5251412047</text:p>
          </table:table-cell>
          <table:table-cell table:style-name="ce22" office:value-type="string" calcext:value-type="string">
            <text:p>KARAKAVALASA ROHITASVA SAI SURYA</text:p>
          </table:table-cell>
          <table:table-cell table:style-name="ce28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54]" office:value-type="float" office:value="7.15384615384615" calcext:value-type="float">
            <text:p>7.15</text:p>
          </table:table-cell>
          <table:table-cell table:style-name="ce45" table:formula="of:=['file:///home/gvp/Downloads/Result%20Analysis%202025-26%20B.Tech%20I%20Year%20I%20Sem%20CSM-A.xls'#$SGPA.AL54]" office:value-type="float" office:value="7.15384615384615" calcext:value-type="float">
            <text:p>7.15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10" office:value-type="float" office:value="5251412048" calcext:value-type="float">
            <text:p>5251412048</text:p>
          </table:table-cell>
          <table:table-cell table:style-name="ce23" office:value-type="string" calcext:value-type="string">
            <text:p>KARUKUNDI PHANI KUMAR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B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55]" office:value-type="float" office:value="8.53846153846154" calcext:value-type="float">
            <text:p>8.54</text:p>
          </table:table-cell>
          <table:table-cell table:style-name="ce45" table:formula="of:=['file:///home/gvp/Downloads/Result%20Analysis%202025-26%20B.Tech%20I%20Year%20I%20Sem%20CSM-A.xls'#$SGPA.AL55]" office:value-type="float" office:value="8.53846153846154" calcext:value-type="float">
            <text:p>8.54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10" office:value-type="float" office:value="5251412049" calcext:value-type="float">
            <text:p>5251412049</text:p>
          </table:table-cell>
          <table:table-cell table:style-name="ce23" office:value-type="string" calcext:value-type="string">
            <text:p>KETHA SAAHITI</text:p>
          </table:table-cell>
          <table:table-cell table:style-name="ce28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style-name="ce32" office:value-type="string" calcext:value-type="string">
            <text:p>E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56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AL56]" office:value-type="float" office:value="5.53846153846154" calcext:value-type="float">
            <text:p>5.54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10" office:value-type="float" office:value="5251412050" calcext:value-type="float">
            <text:p>5251412050</text:p>
          </table:table-cell>
          <table:table-cell table:style-name="ce23" office:value-type="string" calcext:value-type="string">
            <text:p>KILAPARTHI BHAGYA LAKSHMI</text:p>
          </table:table-cell>
          <table:table-cell table:style-name="ce28" office:value-type="string" calcext:value-type="string">
            <text:p>A+</text:p>
          </table:table-cell>
          <table:table-cell table:style-name="ce32" office:value-type="string" calcext:value-type="string">
            <text:p>A+</text:p>
          </table:table-cell>
          <table:table-cell table:style-name="ce32" office:value-type="string" calcext:value-type="string">
            <text:p>C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57]" office:value-type="float" office:value="9" calcext:value-type="float">
            <text:p>9.00</text:p>
          </table:table-cell>
          <table:table-cell table:style-name="ce45" table:formula="of:=['file:///home/gvp/Downloads/Result%20Analysis%202025-26%20B.Tech%20I%20Year%20I%20Sem%20CSM-A.xls'#$SGPA.AL57]" office:value-type="float" office:value="9" calcext:value-type="float">
            <text:p>9.00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10" office:value-type="float" office:value="5251412051" calcext:value-type="float">
            <text:p>5251412051</text:p>
          </table:table-cell>
          <table:table-cell table:style-name="ce22" office:value-type="string" calcext:value-type="string">
            <text:p>KODAVATI PURNESH</text:p>
          </table:table-cell>
          <table:table-cell table:style-name="ce28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58]" office:value-type="float" office:value="6.76923076923077" calcext:value-type="float">
            <text:p>6.77</text:p>
          </table:table-cell>
          <table:table-cell table:style-name="ce45" table:formula="of:=['file:///home/gvp/Downloads/Result%20Analysis%202025-26%20B.Tech%20I%20Year%20I%20Sem%20CSM-A.xls'#$SGPA.AL58]" office:value-type="float" office:value="6.76923076923077" calcext:value-type="float">
            <text:p>6.77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10" office:value-type="float" office:value="5251412052" calcext:value-type="float">
            <text:p>5251412052</text:p>
          </table:table-cell>
          <table:table-cell table:style-name="ce22" office:value-type="string" calcext:value-type="string">
            <text:p>KOREPELLA NEELESH SAI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59]" office:value-type="float" office:value="7.53846153846154" calcext:value-type="float">
            <text:p>7.54</text:p>
          </table:table-cell>
          <table:table-cell table:style-name="ce45" table:formula="of:=['file:///home/gvp/Downloads/Result%20Analysis%202025-26%20B.Tech%20I%20Year%20I%20Sem%20CSM-A.xls'#$SGPA.AL59]" office:value-type="float" office:value="7.53846153846154" calcext:value-type="float">
            <text:p>7.54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10" office:value-type="float" office:value="5251412053" calcext:value-type="float">
            <text:p>5251412053</text:p>
          </table:table-cell>
          <table:table-cell table:style-name="ce23" office:value-type="string" calcext:value-type="string">
            <text:p>KURMA KUNDHANA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+</text:p>
          </table:table-cell>
          <table:table-cell table:style-name="ce42" table:formula="of:=['file:///home/gvp/Downloads/Result%20Analysis%202025-26%20B.Tech%20I%20Year%20I%20Sem%20CSM-A.xls'#$SGPA.AM60]" office:value-type="float" office:value="8.07692307692308" calcext:value-type="float">
            <text:p>8.08</text:p>
          </table:table-cell>
          <table:table-cell table:style-name="ce45" table:formula="of:=['file:///home/gvp/Downloads/Result%20Analysis%202025-26%20B.Tech%20I%20Year%20I%20Sem%20CSM-A.xls'#$SGPA.AL60]" office:value-type="float" office:value="8.07692307692308" calcext:value-type="float">
            <text:p>8.0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10" office:value-type="float" office:value="5251412054" calcext:value-type="float">
            <text:p>5251412054</text:p>
          </table:table-cell>
          <table:table-cell table:style-name="ce23" office:value-type="string" calcext:value-type="string">
            <text:p>LANKADA VENKATA SRINIVAS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61]" office:value-type="float" office:value="7.38461538461539" calcext:value-type="float">
            <text:p>7.38</text:p>
          </table:table-cell>
          <table:table-cell table:style-name="ce45" table:formula="of:=['file:///home/gvp/Downloads/Result%20Analysis%202025-26%20B.Tech%20I%20Year%20I%20Sem%20CSM-A.xls'#$SGPA.AL61]" office:value-type="float" office:value="7.38461538461539" calcext:value-type="float">
            <text:p>7.3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10" office:value-type="float" office:value="5251412055" calcext:value-type="float">
            <text:p>5251412055</text:p>
          </table:table-cell>
          <table:table-cell table:style-name="ce23" office:value-type="string" calcext:value-type="string">
            <text:p>LINGABATHINA MOHITH PRAMOD</text:p>
          </table:table-cell>
          <table:table-cell table:style-name="ce28" office:value-type="string" calcext:value-type="string">
            <text:p>E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62]" office:value-type="float" office:value="7" calcext:value-type="float">
            <text:p>7.00</text:p>
          </table:table-cell>
          <table:table-cell table:style-name="ce45" table:formula="of:=['file:///home/gvp/Downloads/Result%20Analysis%202025-26%20B.Tech%20I%20Year%20I%20Sem%20CSM-A.xls'#$SGPA.AL62]" office:value-type="float" office:value="7" calcext:value-type="float">
            <text:p>7.00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10" office:value-type="float" office:value="5251412056" calcext:value-type="float">
            <text:p>5251412056</text:p>
          </table:table-cell>
          <table:table-cell table:style-name="ce22" office:value-type="string" calcext:value-type="string">
            <text:p>MAJJI PRAVEENA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63]" office:value-type="float" office:value="7.07692307692308" calcext:value-type="float">
            <text:p>7.08</text:p>
          </table:table-cell>
          <table:table-cell table:style-name="ce45" table:formula="of:=['file:///home/gvp/Downloads/Result%20Analysis%202025-26%20B.Tech%20I%20Year%20I%20Sem%20CSM-A.xls'#$SGPA.AL63]" office:value-type="float" office:value="7.07692307692308" calcext:value-type="float">
            <text:p>7.08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10" office:value-type="float" office:value="5251412057" calcext:value-type="float">
            <text:p>5251412057</text:p>
          </table:table-cell>
          <table:table-cell table:style-name="ce23" office:value-type="string" calcext:value-type="string">
            <text:p>MANNAM VARUN TEJA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64]" office:value-type="float" office:value="7.61538461538462" calcext:value-type="float">
            <text:p>7.62</text:p>
          </table:table-cell>
          <table:table-cell table:style-name="ce45"/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10" office:value-type="float" office:value="5251412058" calcext:value-type="float">
            <text:p>5251412058</text:p>
          </table:table-cell>
          <table:table-cell table:style-name="ce23" office:value-type="string" calcext:value-type="string">
            <text:p>MARADANA AKHILA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65]" office:value-type="float" office:value="0" calcext:value-type="float">
            <text:p>0.00</text:p>
          </table:table-cell>
          <table:table-cell table:style-name="ce45"/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10" office:value-type="float" office:value="5251412059" calcext:value-type="float">
            <text:p>5251412059</text:p>
          </table:table-cell>
          <table:table-cell table:style-name="ce23" office:value-type="string" calcext:value-type="string">
            <text:p>MAROJU DONI SAMPATH VINAYAK</text:p>
          </table:table-cell>
          <table:table-cell table:style-name="ce28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42" table:formula="of:=['file:///home/gvp/Downloads/Result%20Analysis%202025-26%20B.Tech%20I%20Year%20I%20Sem%20CSM-A.xls'#$SGPA.AM66]" office:value-type="float" office:value="7.38461538461539" calcext:value-type="float">
            <text:p>7.38</text:p>
          </table:table-cell>
          <table:table-cell table:style-name="ce45"/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10" office:value-type="float" office:value="5251412060" calcext:value-type="float">
            <text:p>5251412060</text:p>
          </table:table-cell>
          <table:table-cell table:style-name="ce22" office:value-type="string" calcext:value-type="string">
            <text:p>PASUPULATI SAI TARUN</text:p>
          </table:table-cell>
          <table:table-cell table:style-name="ce28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D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67]" office:value-type="float" office:value="0" calcext:value-type="float">
            <text:p>0.00</text:p>
          </table:table-cell>
          <table:table-cell table:style-name="ce45"/>
          <table:table-cell table:style-name="Default"/>
          <table:table-cell table:number-columns-repeated="16369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11" office:value-type="float" office:value="5251412061" calcext:value-type="float">
            <text:p>5251412061</text:p>
          </table:table-cell>
          <table:table-cell table:style-name="ce24" office:value-type="string" calcext:value-type="string">
            <text:p>VADAMODULA PRALOK</text:p>
          </table:table-cell>
          <table:table-cell table:style-name="ce28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+</text:p>
          </table:table-cell>
          <table:table-cell table:style-name="ce38" office:value-type="string" calcext:value-type="string">
            <text:p>B</text:p>
          </table:table-cell>
          <table:table-cell table:style-name="ce42" table:formula="of:=['file:///home/gvp/Downloads/Result%20Analysis%202025-26%20B.Tech%20I%20Year%20I%20Sem%20CSM-A.xls'#$SGPA.AM68]" office:value-type="float" office:value="0" calcext:value-type="float">
            <text:p>0.00</text:p>
          </table:table-cell>
          <table:table-cell table:style-name="ce45" table:formula="of:=['file:///home/gvp/Downloads/Result%20Analysis%202025-26%20B.Tech%20I%20Year%20I%20Sem%20CSM-A.xls'#$SGPA.$BQ$69]" office:value-type="float" office:value="0" calcext:value-type="float">
            <text:p>0.00</text:p>
          </table:table-cell>
          <table:table-cell table:style-name="Default"/>
          <table:table-cell table:number-columns-repeated="16369"/>
        </table:table-row>
        <table:table-row table:style-name="ro6" table:number-rows-repeated="1048513">
          <table:table-cell table:number-columns-repeated="16383"/>
        </table:table-row>
        <table:table-row table:style-name="ro6">
          <table:table-cell table:number-columns-repeated="16383"/>
        </table:table-row>
        <table:named-expressions>
          <table:named-range table:name="Excel_BuiltIn_Print_Area" table:base-cell-address="$I.$A$1" table:cell-range-address="$I.$A$1:.$O$62" table:range-usable-as="print-range"/>
          <table:named-range table:name="Excel_BuiltIn_Print_Titles" table:base-cell-address="$I.$A$1" table:cell-range-address="$I.$1:.$1" table:range-usable-as="repeat-column repeat-row"/>
          <table:named-range table:name="Excel_BuiltIn__FilterDatabase" table:base-cell-address="$I.$A$1" table:cell-range-address="$I.$A$1:.$N$62"/>
        </table:named-expressions>
        <calcext:conditional-formats>
          <calcext:conditional-format calcext:target-range-address="I.D2:I.K62">
            <calcext:condition calcext:apply-style-name="Excel_CondFormat_2_3_1" calcext:value="=&quot;F&quot;" calcext:base-cell-address="I.D2"/>
          </calcext:conditional-format>
          <calcext:conditional-format calcext:target-range-address="I.L2:I.L62">
            <calcext:condition calcext:apply-style-name="Excel_CondFormat_2_5_1" calcext:value="&gt;9" calcext:base-cell-address="I.L2"/>
          </calcext:conditional-format>
          <calcext:conditional-format calcext:target-range-address="I.C2:I.C41">
            <calcext:condition calcext:apply-style-name="Excel_CondFormat_2_6_1" calcext:value="formula-is(AND(COUNTIF([.$C$2:.$C$41];[.C2])&gt;1;NOT(ISBLANK([.C2]))))" calcext:base-cell-address="I.C2"/>
          </calcext:conditional-format>
          <calcext:conditional-format calcext:target-range-address="I.C48:I.C61">
            <calcext:condition calcext:apply-style-name="Excel_CondFormat_2_7_1" calcext:value="formula-is(AND(COUNTIF([.$C$48:.$C$61];[.C48])&gt;1;NOT(ISBLANK([.C48]))))" calcext:base-cell-address="I.C48"/>
          </calcext:conditional-format>
          <calcext:conditional-format calcext:target-range-address="I.C48:I.C61">
            <calcext:condition calcext:apply-style-name="Excel_CondFormat_2_8_1" calcext:value="formula-is(AND(COUNTIF([.$C$48:.$C$61];[.C48])&gt;1;NOT(ISBLANK([.C48]))))" calcext:base-cell-address="I.C48"/>
          </calcext:conditional-format>
          <calcext:conditional-format calcext:target-range-address="I.C62:I.C62">
            <calcext:condition calcext:apply-style-name="Excel_CondFormat_2_9_1" calcext:value="formula-is(AND(COUNTIF([.$C$62:.$C$62];[.C62])&gt;1;NOT(ISBLANK([.C62]))))" calcext:base-cell-address="I.C62"/>
          </calcext:conditional-format>
          <calcext:conditional-format calcext:target-range-address="I.C62:I.C62">
            <calcext:condition calcext:apply-style-name="Excel_CondFormat_2_10_1" calcext:value="formula-is(AND(COUNTIF([.$C$62:.$C$62];[.C62])&gt;1;NOT(ISBLANK([.C62]))))" calcext:base-cell-address="I.C62"/>
          </calcext:conditional-format>
          <calcext:conditional-format calcext:target-range-address="I.C2:I.C47">
            <calcext:condition calcext:apply-style-name="Excel_CondFormat_2_11_1" calcext:value="formula-is(AND(COUNTIF([.$C$2:.$C$47];[.C2])&gt;1;NOT(ISBLANK([.C2]))))" calcext:base-cell-address="I.C2"/>
          </calcext:conditional-format>
          <calcext:conditional-format calcext:target-range-address="I.D2:I.K62">
            <calcext:condition calcext:apply-style-name="Excel_CondFormat_2_12_1" calcext:value="=&quot;AB&quot;" calcext:base-cell-address="I.D2"/>
          </calcext:conditional-format>
        </calcext:conditional-formats>
      </table:table>
      <table:table table:name="'file:///home/gvp/Downloads/Result%20Analysis%202025-26%20B.Tech%20I%20Year%20I%20Sem%20CSM-A.xls'#SGPA" table:print="false" table:style-name="ta_extref">
        <table:table-source xlink:type="simple" xlink:href="../../Downloads/Result%20Analysis%202025-26%20B.Tech%20I%20Year%20I%20Sem%20CSM-A.xls" table:table-name="SGPA" table:filter-name="MS Excel 97" table:mode="copy-results-only"/>
        <table:table-column table:number-columns-repeated="39"/>
        <table:table-row table:number-rows-repeated="7">
          <table:table-cell table:number-columns-repeated="39"/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76923076923077">
            <text:p>5.76923076923077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8461538461539">
            <text:p>9.38461538461539</text:p>
          </table:table-cell>
          <table:table-cell table:style-name="ce1" office:value-type="float" office:value="9.38461538461539">
            <text:p>9.3846153846153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3076923076923">
            <text:p>9.23076923076923</text:p>
          </table:table-cell>
          <table:table-cell table:style-name="ce1" office:value-type="float" office:value="9.23076923076923">
            <text:p>9.23076923076923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0769230769231">
            <text:p>8.30769230769231</text:p>
          </table:table-cell>
          <table:table-cell table:style-name="ce1" office:value-type="float" office:value="8.30769230769231">
            <text:p>8.30769230769231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5384615384615">
            <text:p>8.15384615384615</text:p>
          </table:table-cell>
          <table:table-cell table:style-name="ce1" office:value-type="float" office:value="8.15384615384615">
            <text:p>8.15384615384615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8461538461539">
            <text:p>7.38461538461539</text:p>
          </table:table-cell>
          <table:table-cell table:style-name="ce1" office:value-type="float" office:value="7.38461538461539">
            <text:p>7.3846153846153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4615384615385">
            <text:p>8.84615384615385</text:p>
          </table:table-cell>
          <table:table-cell table:style-name="ce1" office:value-type="float" office:value="8.84615384615385">
            <text:p>8.84615384615385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7692307692308">
            <text:p>8.07692307692308</text:p>
          </table:table-cell>
          <table:table-cell table:style-name="ce1" office:value-type="float" office:value="8.07692307692308">
            <text:p>8.07692307692308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76923076923077">
            <text:p>3.76923076923077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.30769230769231">
            <text:p>3.3076923076923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4615384615385">
            <text:p>8.84615384615385</text:p>
          </table:table-cell>
          <table:table-cell table:style-name="ce1" office:value-type="float" office:value="8.84615384615385">
            <text:p>8.84615384615385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1538461538462">
            <text:p>9.61538461538462</text:p>
          </table:table-cell>
          <table:table-cell table:style-name="ce1" office:value-type="float" office:value="9.61538461538462">
            <text:p>9.61538461538462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1538461538462">
            <text:p>8.61538461538462</text:p>
          </table:table-cell>
          <table:table-cell table:style-name="ce1" office:value-type="float" office:value="8.61538461538462">
            <text:p>8.61538461538462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69230769230769">
            <text:p>7.69230769230769</text:p>
          </table:table-cell>
          <table:table-cell table:style-name="ce1" office:value-type="float" office:value="7.69230769230769">
            <text:p>7.6923076923076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23076923076923">
            <text:p>8.23076923076923</text:p>
          </table:table-cell>
          <table:table-cell table:style-name="ce1" office:value-type="float" office:value="8.23076923076923">
            <text:p>8.23076923076923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92307692307692">
            <text:p>7.92307692307692</text:p>
          </table:table-cell>
          <table:table-cell table:style-name="ce1" office:value-type="float" office:value="7.92307692307692">
            <text:p>7.92307692307692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76923076923077">
            <text:p>6.76923076923077</text:p>
          </table:table-cell>
          <table:table-cell table:style-name="ce1" office:value-type="float" office:value="6.76923076923077">
            <text:p>6.76923076923077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76923076923077">
            <text:p>3.76923076923077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6923076923077">
            <text:p>8.76923076923077</text:p>
          </table:table-cell>
          <table:table-cell table:style-name="ce1" office:value-type="float" office:value="8.76923076923077">
            <text:p>8.76923076923077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92307692307692">
            <text:p>6.92307692307692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5384615384615">
            <text:p>9.15384615384615</text:p>
          </table:table-cell>
          <table:table-cell table:style-name="ce1" office:value-type="float" office:value="9.15384615384615">
            <text:p>9.15384615384615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76923076923077">
            <text:p>2.76923076923077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6153846153846">
            <text:p>7.46153846153846</text:p>
          </table:table-cell>
          <table:table-cell table:style-name="ce1" office:value-type="float" office:value="7.46153846153846">
            <text:p>7.46153846153846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6153846153846">
            <text:p>7.46153846153846</text:p>
          </table:table-cell>
          <table:table-cell table:style-name="ce1" office:value-type="float" office:value="7.46153846153846">
            <text:p>7.46153846153846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8461538461539">
            <text:p>8.38461538461539</text:p>
          </table:table-cell>
          <table:table-cell table:style-name="ce1" office:value-type="float" office:value="8.38461538461539">
            <text:p>8.3846153846153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8461538461539">
            <text:p>8.38461538461539</text:p>
          </table:table-cell>
          <table:table-cell table:style-name="ce1" office:value-type="float" office:value="8.38461538461539">
            <text:p>8.3846153846153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9230769230769">
            <text:p>8.69230769230769</text:p>
          </table:table-cell>
          <table:table-cell table:style-name="ce1" office:value-type="float" office:value="8.69230769230769">
            <text:p>8.69230769230769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15384615384615">
            <text:p>6.15384615384615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92307692307692">
            <text:p>7.92307692307692</text:p>
          </table:table-cell>
          <table:table-cell table:style-name="ce1" office:value-type="float" office:value="7.92307692307692">
            <text:p>7.92307692307692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6923076923077">
            <text:p>8.76923076923077</text:p>
          </table:table-cell>
          <table:table-cell table:style-name="ce1" office:value-type="float" office:value="8.76923076923077">
            <text:p>8.76923076923077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6153846153846">
            <text:p>9.46153846153846</text:p>
          </table:table-cell>
          <table:table-cell table:style-name="ce1" office:value-type="float" office:value="9.46153846153846">
            <text:p>9.46153846153846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76923076923077">
            <text:p>6.76923076923077</text:p>
          </table:table-cell>
          <table:table-cell table:style-name="ce1" office:value-type="float" office:value="6.76923076923077">
            <text:p>6.76923076923077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6153846153846">
            <text:p>9.46153846153846</text:p>
          </table:table-cell>
          <table:table-cell table:style-name="ce1" office:value-type="float" office:value="9.46153846153846">
            <text:p>9.46153846153846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846153846154">
            <text:p>8.53846153846154</text:p>
          </table:table-cell>
          <table:table-cell table:style-name="ce1" office:value-type="float" office:value="8.53846153846154">
            <text:p>8.53846153846154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92307692307692">
            <text:p>6.92307692307692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92307692307692">
            <text:p>7.92307692307692</text:p>
          </table:table-cell>
          <table:table-cell table:style-name="ce1" office:value-type="float" office:value="7.92307692307692">
            <text:p>7.92307692307692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38461538461539">
            <text:p>6.38461538461539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7692307692308">
            <text:p>8.07692307692308</text:p>
          </table:table-cell>
          <table:table-cell table:style-name="ce1" office:value-type="float" office:value="8.07692307692308">
            <text:p>8.07692307692308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6153846153846">
            <text:p>8.46153846153846</text:p>
          </table:table-cell>
          <table:table-cell table:style-name="ce1" office:value-type="float" office:value="8.46153846153846">
            <text:p>8.46153846153846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3076923076923">
            <text:p>9.23076923076923</text:p>
          </table:table-cell>
          <table:table-cell table:style-name="ce1" office:value-type="float" office:value="9.23076923076923">
            <text:p>9.23076923076923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846153846154">
            <text:p>8.53846153846154</text:p>
          </table:table-cell>
          <table:table-cell table:style-name="ce1" office:value-type="float" office:value="8.53846153846154">
            <text:p>8.53846153846154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846153846154">
            <text:p>8.53846153846154</text:p>
          </table:table-cell>
          <table:table-cell table:style-name="ce1" office:value-type="float" office:value="8.53846153846154">
            <text:p>8.53846153846154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4615384615385">
            <text:p>8.84615384615385</text:p>
          </table:table-cell>
          <table:table-cell table:style-name="ce1" office:value-type="float" office:value="8.84615384615385">
            <text:p>8.84615384615385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4615384615385">
            <text:p>8.84615384615385</text:p>
          </table:table-cell>
          <table:table-cell table:style-name="ce1" office:value-type="float" office:value="8.84615384615385">
            <text:p>8.84615384615385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8461538461539">
            <text:p>7.38461538461539</text:p>
          </table:table-cell>
          <table:table-cell table:style-name="ce1" office:value-type="float" office:value="7.38461538461539">
            <text:p>7.3846153846153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5384615384615">
            <text:p>7.15384615384615</text:p>
          </table:table-cell>
          <table:table-cell table:style-name="ce1" office:value-type="float" office:value="7.15384615384615">
            <text:p>7.15384615384615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846153846154">
            <text:p>8.53846153846154</text:p>
          </table:table-cell>
          <table:table-cell table:style-name="ce1" office:value-type="float" office:value="8.53846153846154">
            <text:p>8.53846153846154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53846153846154">
            <text:p>5.53846153846154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76923076923077">
            <text:p>6.76923076923077</text:p>
          </table:table-cell>
          <table:table-cell table:style-name="ce1" office:value-type="float" office:value="6.76923076923077">
            <text:p>6.76923076923077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3846153846154">
            <text:p>7.53846153846154</text:p>
          </table:table-cell>
          <table:table-cell table:style-name="ce1" office:value-type="float" office:value="7.53846153846154">
            <text:p>7.53846153846154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7692307692308">
            <text:p>8.07692307692308</text:p>
          </table:table-cell>
          <table:table-cell table:style-name="ce1" office:value-type="float" office:value="8.07692307692308">
            <text:p>8.07692307692308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8461538461539">
            <text:p>7.38461538461539</text:p>
          </table:table-cell>
          <table:table-cell table:style-name="ce1" office:value-type="float" office:value="7.38461538461539">
            <text:p>7.38461538461539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7692307692308">
            <text:p>7.07692307692308</text:p>
          </table:table-cell>
          <table:table-cell table:style-name="ce1" office:value-type="float" office:value="7.07692307692308">
            <text:p>7.07692307692308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7.61538461538462">
            <text:p>7.61538461538462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7.38461538461539">
            <text:p>7.38461538461539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named-expressions/>
      <table:database-ranges>
        <table:database-range table:name="__Anonymous_Sheet_DB__0" table:target-range-address="I.A1:I.M6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₹ </number:text>
      <number:number number:decimal-places="0" number:min-decimal-places="0" number:min-integer-digits="1" number:grouping="true"/>
    </number:number-style>
    <number:number-style style:name="N130">
      <number:text>₹ 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₹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₹ </number:text>
      <number:number number:decimal-places="2" number:min-decimal-places="2" number:min-integer-digits="1" number:grouping="true"/>
    </number:number-style>
    <number:number-style style:name="N133">
      <number:text>₹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₹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 loext:blank-width-char=" 1">-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 "> ₹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2P1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2P2" style:volatile="true">
      <number:text loext:blank-width-char=" "> ₹ </number:text>
      <number:fill-character> </number:fill-character>
      <number:text loext:blank-width-char=" 1">-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6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6">
      <number:text loext:blank-width-char=" "> </number:text>
      <number:text-content/>
      <number:text loext:blank-width-char=" 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 "> ₹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0P1" style:volatile="true">
      <number:text loext:blank-width-char=" "> ₹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0P2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0">
      <number:text loext:blank-width-char=" "> </number:text>
      <number:text-content/>
      <number:text loext:blank-width-char=" 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 loext:blank-width-char="("> $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4" number:min-decimal-places="4" number:min-integer-digits="1"/>
    </number:number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">
      <number:number number:decimal-places="10" number:min-decimal-places="10" number:min-integer-digits="1"/>
    </number:number-style>
    <number:number-style style:name="N187">
      <number:number number:decimal-places="11" number:min-decimal-places="11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9" number:min-decimal-places="9" number:min-integer-digits="1"/>
    </number:number-style>
    <number:number-style style:name="N190">
      <number:number number:decimal-places="8" number:min-decimal-places="8" number:min-integer-digits="1"/>
    </number:number-style>
    <number:number-style style:name="N191">
      <number:number number:decimal-places="7" number:min-decimal-places="7" number:min-integer-digits="1"/>
    </number:number-style>
    <number:number-style style:name="N192">
      <number:number number:decimal-places="6" number:min-decimal-places="6" number:min-integer-digits="1"/>
    </number:number-style>
    <number:number-style style:name="N193">
      <number:number number:decimal-places="5" number:min-decimal-places="5" number:min-integer-digits="1"/>
    </number:number-style>
    <number:number-style style:name="N194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ff99cc"/>
      <style:text-properties fo:color="#800080"/>
    </style:style>
    <style:style style:name="Excel_5f_CondFormat_5f_2_5f_2_5f_1" style:display-name="Excel_CondFormat_2_2_1" style:family="table-cell" style:parent-style-name="Default">
      <style:table-cell-properties fo:background-color="#ff99cc"/>
      <style:text-properties fo:color="#800080"/>
    </style:style>
    <style:style style:name="Excel_5f_CondFormat_5f_2_5f_3_5f_1" style:display-name="Excel_CondFormat_2_3_1" style:family="table-cell" style:parent-style-name="Default">
      <style:table-cell-properties fo:background-color="#ff99cc"/>
      <style:text-properties fo:color="#800080"/>
    </style:style>
    <style:style style:name="Excel_5f_CondFormat_5f_2_5f_4_5f_1" style:display-name="Excel_CondFormat_2_4_1" style:family="table-cell" style:parent-style-name="Default">
      <style:table-cell-properties fo:background-color="#ff99cc"/>
      <style:text-properties fo:color="#800080"/>
    </style:style>
    <style:style style:name="Excel_5f_CondFormat_5f_2_5f_5_5f_1" style:display-name="Excel_CondFormat_2_5_1" style:family="table-cell" style:parent-style-name="Default">
      <style:table-cell-properties fo:background-color="#ccffcc"/>
      <style:text-properties fo:color="#008000"/>
    </style:style>
    <style:style style:name="Excel_5f_CondFormat_5f_2_5f_6_5f_1" style:display-name="Excel_CondFormat_2_6_1" style:family="table-cell" style:parent-style-name="Default">
      <style:table-cell-properties fo:background-color="#ff99cc"/>
      <style:text-properties fo:color="#800080"/>
    </style:style>
    <style:style style:name="Excel_5f_CondFormat_5f_2_5f_7_5f_1" style:display-name="Excel_CondFormat_2_7_1" style:family="table-cell" style:parent-style-name="Default">
      <style:table-cell-properties fo:background-color="#ff99cc"/>
      <style:text-properties fo:color="#800080"/>
    </style:style>
    <style:style style:name="Excel_5f_CondFormat_5f_2_5f_8_5f_1" style:display-name="Excel_CondFormat_2_8_1" style:family="table-cell" style:parent-style-name="Default">
      <style:table-cell-properties fo:background-color="#ff99cc"/>
      <style:text-properties fo:color="#800080"/>
    </style:style>
    <style:style style:name="Excel_5f_CondFormat_5f_2_5f_9_5f_1" style:display-name="Excel_CondFormat_2_9_1" style:family="table-cell" style:parent-style-name="Default">
      <style:table-cell-properties fo:background-color="#ff99cc"/>
      <style:text-properties fo:color="#800080"/>
    </style:style>
    <style:style style:name="Excel_5f_CondFormat_5f_2_5f_10_5f_1" style:display-name="Excel_CondFormat_2_10_1" style:family="table-cell" style:parent-style-name="Default">
      <style:table-cell-properties fo:background-color="#ff99cc"/>
      <style:text-properties fo:color="#800080"/>
    </style:style>
    <style:style style:name="Excel_5f_CondFormat_5f_2_5f_11_5f_1" style:display-name="Excel_CondFormat_2_11_1" style:family="table-cell" style:parent-style-name="Default">
      <style:table-cell-properties fo:background-color="#ff99cc"/>
      <style:text-properties fo:color="#800080"/>
    </style:style>
    <style:style style:name="Excel_5f_CondFormat_5f_2_5f_12_5f_1" style:display-name="Excel_CondFormat_2_12_1" style:family="table-cell" style:parent-style-name="Default">
      <style:table-cell-properties fo:background-color="#ffff99"/>
      <style:text-properties fo:color="#9933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12:07:29.768823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11:59:37.921001788</meta:creation-date>
    <dc:date>2026-07-10T12:09:41.801499223</dc:date>
    <meta:editing-duration>PT6M26S</meta:editing-duration>
    <meta:editing-cycles>2</meta:editing-cycles>
    <meta:generator>LibreOffice/26.2.4.2$Linux_X86_64 LibreOffice_project/3346a99e6b841765b75a9b29714a5b95c6761ce3</meta:generator>
    <meta:document-statistic meta:table-count="1" meta:cell-count="802" meta:object-count="0"/>
  </office:meta>
</office:document-meta>
</file>