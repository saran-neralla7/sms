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1.4752in"/>
    </style:style>
    <style:style style:name="co2" style:family="table-column">
      <style:table-column-properties fo:break-before="auto" style:column-width="3.7126in"/>
    </style:style>
    <style:style style:name="co3" style:family="table-column">
      <style:table-column-properties fo:break-before="auto" style:column-width="1.7252in"/>
    </style:style>
    <style:style style:name="co4" style:family="table-column">
      <style:table-column-properties fo:break-before="auto" style:column-width="0.75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1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2nd year list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number-columns-repeated="16381"/>
        <table:table-row table:style-name="ro1">
          <table:table-cell table:style-name="ce1" office:value-type="string" calcext:value-type="string">
            <text:p>REGD.NO</text:p>
          </table:table-cell>
          <table:table-cell table:style-name="ce4" office:value-type="string" calcext:value-type="string">
            <text:p>NAME OF THE STUDENT</text:p>
          </table:table-cell>
          <table:table-cell table:style-name="ce8" office:value-type="string" calcext:value-type="string">
            <text:p>PARENT NUMBER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1" calcext:value-type="float">
            <text:p>5241401001</text:p>
          </table:table-cell>
          <table:table-cell table:style-name="ce5" office:value-type="string" calcext:value-type="string">
            <text:p>ABDUL AZEEM</text:p>
          </table:table-cell>
          <table:table-cell table:style-name="ce9" office:value-type="float" office:value="8247572061" calcext:value-type="float">
            <text:p>8247572061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5241401002" calcext:value-type="float">
            <text:p>5241401002</text:p>
          </table:table-cell>
          <table:table-cell table:style-name="ce5" office:value-type="string" calcext:value-type="string">
            <text:p>ADIREDDI PAVAN SAI</text:p>
          </table:table-cell>
          <table:table-cell table:style-name="ce6" office:value-type="float" office:value="9705534172" calcext:value-type="float">
            <text:p>9705534172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3" calcext:value-type="float">
            <text:p>5241401003</text:p>
          </table:table-cell>
          <table:table-cell table:style-name="ce5" office:value-type="string" calcext:value-type="string">
            <text:p>AKULA BHANU PRAKASH</text:p>
          </table:table-cell>
          <table:table-cell table:style-name="ce9" office:value-type="float" office:value="8008405559" calcext:value-type="float">
            <text:p>800840555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4" calcext:value-type="float">
            <text:p>5241401004</text:p>
          </table:table-cell>
          <table:table-cell table:style-name="ce5" office:value-type="string" calcext:value-type="string">
            <text:p>ANUPOJU GAYATRI ACHARY</text:p>
          </table:table-cell>
          <table:table-cell table:style-name="ce9" office:value-type="float" office:value="8143775748" calcext:value-type="float">
            <text:p>8143775748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5" calcext:value-type="float">
            <text:p>5241401005</text:p>
          </table:table-cell>
          <table:table-cell table:style-name="ce5" office:value-type="string" calcext:value-type="string">
            <text:p>ARLE SHANMUKHI</text:p>
          </table:table-cell>
          <table:table-cell table:style-name="ce9" office:value-type="float" office:value="7075001755" calcext:value-type="float">
            <text:p>7075001755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6" calcext:value-type="float">
            <text:p>5241401006</text:p>
          </table:table-cell>
          <table:table-cell table:style-name="ce5" office:value-type="string" calcext:value-type="string">
            <text:p>BANALA SAI KIRAN</text:p>
          </table:table-cell>
          <table:table-cell table:style-name="ce9" office:value-type="float" office:value="9346065317" calcext:value-type="float">
            <text:p>9346065317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7" calcext:value-type="float">
            <text:p>5241401007</text:p>
          </table:table-cell>
          <table:table-cell table:style-name="ce5" office:value-type="string" calcext:value-type="string">
            <text:p>BHOGAVALLI SATHVIKA</text:p>
          </table:table-cell>
          <table:table-cell table:style-name="ce9" office:value-type="float" office:value="8074385999" calcext:value-type="float">
            <text:p>807438599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8" calcext:value-type="float">
            <text:p>5241401008</text:p>
          </table:table-cell>
          <table:table-cell table:style-name="ce5" office:value-type="string" calcext:value-type="string">
            <text:p>BODDEDA SUNIL PAVAN</text:p>
          </table:table-cell>
          <table:table-cell table:style-name="ce9" office:value-type="float" office:value="9398456628" calcext:value-type="float">
            <text:p>9398456628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09" calcext:value-type="float">
            <text:p>5241401009</text:p>
          </table:table-cell>
          <table:table-cell table:style-name="ce5" office:value-type="string" calcext:value-type="string">
            <text:p>BUGATHA SRIVALLI</text:p>
          </table:table-cell>
          <table:table-cell table:style-name="ce9" office:value-type="float" office:value="8106512010" calcext:value-type="float">
            <text:p>8106512010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0" calcext:value-type="float">
            <text:p>5241401010</text:p>
          </table:table-cell>
          <table:table-cell table:style-name="ce5" office:value-type="string" calcext:value-type="string">
            <text:p>CHOWDARI MAHESH</text:p>
          </table:table-cell>
          <table:table-cell table:style-name="ce9" office:value-type="float" office:value="9705507461" calcext:value-type="float">
            <text:p>9705507461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1" calcext:value-type="float">
            <text:p>5241401011</text:p>
          </table:table-cell>
          <table:table-cell table:style-name="ce5" office:value-type="string" calcext:value-type="string">
            <text:p>DANNANA JHANCIRANI</text:p>
          </table:table-cell>
          <table:table-cell table:style-name="ce10" office:value-type="float" office:value="8247603127" calcext:value-type="float">
            <text:p>8247603127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2" calcext:value-type="float">
            <text:p>5241401012</text:p>
          </table:table-cell>
          <table:table-cell table:style-name="ce5" office:value-type="string" calcext:value-type="string">
            <text:p>DATTI DILEEP</text:p>
          </table:table-cell>
          <table:table-cell table:style-name="ce9" office:value-type="float" office:value="9052419691" calcext:value-type="float">
            <text:p>9052419691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3" calcext:value-type="float">
            <text:p>5241401013</text:p>
          </table:table-cell>
          <table:table-cell table:style-name="ce5" office:value-type="string" calcext:value-type="string">
            <text:p>DEVULAPALLI VIJAY CHANDRA MAHESH</text:p>
          </table:table-cell>
          <table:table-cell table:style-name="ce9" office:value-type="float" office:value="9603351199" calcext:value-type="float">
            <text:p>960335119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4" calcext:value-type="float">
            <text:p>5241401014</text:p>
          </table:table-cell>
          <table:table-cell table:style-name="ce5" office:value-type="string" calcext:value-type="string">
            <text:p>ELURU MOHAN SAI</text:p>
          </table:table-cell>
          <table:table-cell table:style-name="ce9" office:value-type="float" office:value="9573573198" calcext:value-type="float">
            <text:p>9573573198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5" calcext:value-type="float">
            <text:p>5241401015</text:p>
          </table:table-cell>
          <table:table-cell table:style-name="ce5" office:value-type="string" calcext:value-type="string">
            <text:p>GARIKINA AKASH</text:p>
          </table:table-cell>
          <table:table-cell table:style-name="ce9" office:value-type="float" office:value="9541018104" calcext:value-type="float">
            <text:p>954101810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6" calcext:value-type="float">
            <text:p>5241401016</text:p>
          </table:table-cell>
          <table:table-cell table:style-name="ce5" office:value-type="string" calcext:value-type="string">
            <text:p>GOLLU NAVEEN</text:p>
          </table:table-cell>
          <table:table-cell table:style-name="ce9" office:value-type="float" office:value="9032582257" calcext:value-type="float">
            <text:p>9032582257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7" calcext:value-type="float">
            <text:p>5241401017</text:p>
          </table:table-cell>
          <table:table-cell table:style-name="ce5" office:value-type="string" calcext:value-type="string">
            <text:p>GULLIPALLI ANUSHA</text:p>
          </table:table-cell>
          <table:table-cell table:style-name="ce9" office:value-type="float" office:value="9848366851" calcext:value-type="float">
            <text:p>9848366851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8" calcext:value-type="float">
            <text:p>5241401018</text:p>
          </table:table-cell>
          <table:table-cell table:style-name="ce5" office:value-type="string" calcext:value-type="string">
            <text:p>GUNUPUDI ELIAZER</text:p>
          </table:table-cell>
          <table:table-cell table:style-name="ce9" office:value-type="float" office:value="8500813553" calcext:value-type="float">
            <text:p>8500813553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19" calcext:value-type="float">
            <text:p>5241401019</text:p>
          </table:table-cell>
          <table:table-cell table:style-name="ce5" office:value-type="string" calcext:value-type="string">
            <text:p>KADALI JAYA KIRAN</text:p>
          </table:table-cell>
          <table:table-cell table:style-name="ce9" office:value-type="float" office:value="8008870981" calcext:value-type="float">
            <text:p>8008870981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0" calcext:value-type="float">
            <text:p>5241401020</text:p>
          </table:table-cell>
          <table:table-cell table:style-name="ce5" office:value-type="string" calcext:value-type="string">
            <text:p>KAVADANA ARAVIND</text:p>
          </table:table-cell>
          <table:table-cell table:style-name="ce11" office:value-type="float" office:value="7993479054" calcext:value-type="float">
            <text:p>7993479054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5241401021" calcext:value-type="float">
            <text:p>5241401021</text:p>
          </table:table-cell>
          <table:table-cell table:style-name="ce6" office:value-type="string" calcext:value-type="string">
            <text:p>MUDIYA JOSHNAVI</text:p>
          </table:table-cell>
          <table:table-cell table:style-name="ce9" office:value-type="float" office:value="7032595860" calcext:value-type="float">
            <text:p>7032595860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2" calcext:value-type="float">
            <text:p>5241401022</text:p>
          </table:table-cell>
          <table:table-cell table:style-name="ce5" office:value-type="string" calcext:value-type="string">
            <text:p>MANGISETTI REVATHI</text:p>
          </table:table-cell>
          <table:table-cell table:style-name="ce9" office:value-type="float" office:value="8340888090" calcext:value-type="float">
            <text:p>8340888090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3" calcext:value-type="float">
            <text:p>5241401023</text:p>
          </table:table-cell>
          <table:table-cell table:style-name="ce5" office:value-type="string" calcext:value-type="string">
            <text:p>MUKKI SRINIVAS</text:p>
          </table:table-cell>
          <table:table-cell table:style-name="ce9" office:value-type="float" office:value="8886960547" calcext:value-type="float">
            <text:p>8886960547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4" calcext:value-type="float">
            <text:p>5241401024</text:p>
          </table:table-cell>
          <table:table-cell table:style-name="ce5" office:value-type="string" calcext:value-type="string">
            <text:p>NADIMINTI MURALIDHAR</text:p>
          </table:table-cell>
          <table:table-cell table:style-name="ce9" office:value-type="float" office:value="7780310879" calcext:value-type="float">
            <text:p>778031087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5" calcext:value-type="float">
            <text:p>5241401025</text:p>
          </table:table-cell>
          <table:table-cell table:style-name="ce5" office:value-type="string" calcext:value-type="string">
            <text:p>NALLABIDDI NAGA PRAVEEN</text:p>
          </table:table-cell>
          <table:table-cell table:style-name="ce9" office:value-type="float" office:value="9985322668" calcext:value-type="float">
            <text:p>9985322668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6" calcext:value-type="float">
            <text:p>5241401026</text:p>
          </table:table-cell>
          <table:table-cell table:style-name="ce5" office:value-type="string" calcext:value-type="string">
            <text:p>PAPPALA ATUCHTU KUMAR (B)</text:p>
          </table:table-cell>
          <table:table-cell table:style-name="ce12" office:value-type="float" office:value="8142074874" calcext:value-type="float">
            <text:p>814207487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7" calcext:value-type="float">
            <text:p>5241401027</text:p>
          </table:table-cell>
          <table:table-cell table:style-name="ce5" office:value-type="string" calcext:value-type="string">
            <text:p>PEDDINTI NARENDRA</text:p>
          </table:table-cell>
          <table:table-cell table:style-name="ce9" office:value-type="float" office:value="9573574768" calcext:value-type="float">
            <text:p>9573574768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8" calcext:value-type="float">
            <text:p>5241401028</text:p>
          </table:table-cell>
          <table:table-cell table:style-name="ce5" office:value-type="string" calcext:value-type="string">
            <text:p>POTLA MEENAN</text:p>
          </table:table-cell>
          <table:table-cell table:style-name="ce9" office:value-type="float" office:value="9666944654" calcext:value-type="float">
            <text:p>966694465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29" calcext:value-type="float">
            <text:p>5241401029</text:p>
          </table:table-cell>
          <table:table-cell table:style-name="ce5" office:value-type="string" calcext:value-type="string">
            <text:p>RAJABATTULA POORNA SEKHAR</text:p>
          </table:table-cell>
          <table:table-cell table:style-name="ce9" office:value-type="float" office:value="9705175744" calcext:value-type="float">
            <text:p>970517574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0" calcext:value-type="float">
            <text:p>5241401030</text:p>
          </table:table-cell>
          <table:table-cell table:style-name="ce5" office:value-type="string" calcext:value-type="string">
            <text:p>SAI ADITYA KINTADA</text:p>
          </table:table-cell>
          <table:table-cell table:style-name="ce9" office:value-type="float" office:value="8779505559" calcext:value-type="float">
            <text:p>877950555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1" calcext:value-type="float">
            <text:p>5241401031</text:p>
          </table:table-cell>
          <table:table-cell table:style-name="ce5" office:value-type="string" calcext:value-type="string">
            <text:p>SENAPATHI PRANATHI</text:p>
          </table:table-cell>
          <table:table-cell table:style-name="ce9" office:value-type="float" office:value="9030621447" calcext:value-type="float">
            <text:p>9030621447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2" calcext:value-type="float">
            <text:p>5241401032</text:p>
          </table:table-cell>
          <table:table-cell table:style-name="ce5" office:value-type="string" calcext:value-type="string">
            <text:p>SHAIK RASHEED</text:p>
          </table:table-cell>
          <table:table-cell table:style-name="ce9" office:value-type="float" office:value="9000286415" calcext:value-type="float">
            <text:p>9000286415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3" calcext:value-type="float">
            <text:p>5241401033</text:p>
          </table:table-cell>
          <table:table-cell table:style-name="ce5" office:value-type="string" calcext:value-type="string">
            <text:p>SIDAGA TULASI PREETHI</text:p>
          </table:table-cell>
          <table:table-cell table:style-name="ce9" office:value-type="float" office:value="7207525361" calcext:value-type="float">
            <text:p>7207525361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4" calcext:value-type="float">
            <text:p>5241401034</text:p>
          </table:table-cell>
          <table:table-cell table:style-name="ce5" office:value-type="string" calcext:value-type="string">
            <text:p>SIDAGAM TEJA</text:p>
          </table:table-cell>
          <table:table-cell table:style-name="ce9" office:value-type="float" office:value="9908099797" calcext:value-type="float">
            <text:p>9908099797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5" calcext:value-type="float">
            <text:p>5241401035</text:p>
          </table:table-cell>
          <table:table-cell table:style-name="ce5" office:value-type="string" calcext:value-type="string">
            <text:p>SINGIDI SHIVAJI</text:p>
          </table:table-cell>
          <table:table-cell table:style-name="ce9" office:value-type="float" office:value="7671855574" calcext:value-type="float">
            <text:p>767185557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6" calcext:value-type="float">
            <text:p>5241401036</text:p>
          </table:table-cell>
          <table:table-cell table:style-name="ce5" office:value-type="string" calcext:value-type="string">
            <text:p>THADI SANDEEP CHANDRA</text:p>
          </table:table-cell>
          <table:table-cell table:style-name="ce9" office:value-type="float" office:value="9912751557" calcext:value-type="float">
            <text:p>9912751557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7" calcext:value-type="float">
            <text:p>5241401037</text:p>
          </table:table-cell>
          <table:table-cell table:style-name="ce5" office:value-type="string" calcext:value-type="string">
            <text:p>THOTA SAILAJA</text:p>
          </table:table-cell>
          <table:table-cell table:style-name="ce9" office:value-type="float" office:value="7038450872" calcext:value-type="float">
            <text:p>7038450872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8" calcext:value-type="float">
            <text:p>5241401038</text:p>
          </table:table-cell>
          <table:table-cell table:style-name="ce5" office:value-type="string" calcext:value-type="string">
            <text:p>TORRI GYANESH</text:p>
          </table:table-cell>
          <table:table-cell table:style-name="ce9" office:value-type="float" office:value="6281299442" calcext:value-type="float">
            <text:p>6281299442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39" calcext:value-type="float">
            <text:p>5241401039</text:p>
          </table:table-cell>
          <table:table-cell table:style-name="ce5" office:value-type="string" calcext:value-type="string">
            <text:p>VAIGALA ABHISHEK</text:p>
          </table:table-cell>
          <table:table-cell table:style-name="ce9" office:value-type="float" office:value="9550482534" calcext:value-type="float">
            <text:p>955048253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0" calcext:value-type="float">
            <text:p>5241401040</text:p>
          </table:table-cell>
          <table:table-cell table:style-name="ce5" office:value-type="string" calcext:value-type="string">
            <text:p>VEMULAVALASA GAYATHRI</text:p>
          </table:table-cell>
          <table:table-cell table:style-name="ce9" office:value-type="float" office:value="9542952489" calcext:value-type="float">
            <text:p>954295248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1" calcext:value-type="float">
            <text:p>5241401041</text:p>
          </table:table-cell>
          <table:table-cell table:style-name="ce5" office:value-type="string" calcext:value-type="string">
            <text:p>BONANGI SRI HARSHA VARDHAN</text:p>
          </table:table-cell>
          <table:table-cell table:style-name="ce13" office:value-type="float" office:value="8008709761" calcext:value-type="float">
            <text:p>8008709761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2" calcext:value-type="float">
            <text:p>5241401042</text:p>
          </table:table-cell>
          <table:table-cell table:style-name="ce5" office:value-type="string" calcext:value-type="string">
            <text:p>DABBIRU PREM SAI </text:p>
          </table:table-cell>
          <table:table-cell table:style-name="ce13" office:value-type="float" office:value="8919983230" calcext:value-type="float">
            <text:p>8919983230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3" calcext:value-type="float">
            <text:p>5241401043</text:p>
          </table:table-cell>
          <table:table-cell table:style-name="ce5" office:value-type="string" calcext:value-type="string">
            <text:p>DARLA CHARAN TEJA</text:p>
          </table:table-cell>
          <table:table-cell table:style-name="ce13" office:value-type="float" office:value="9705305162" calcext:value-type="float">
            <text:p>9705305162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4" calcext:value-type="float">
            <text:p>5241401044</text:p>
          </table:table-cell>
          <table:table-cell table:style-name="ce5" office:value-type="string" calcext:value-type="string">
            <text:p>GORAJANA THANUJA</text:p>
          </table:table-cell>
          <table:table-cell table:style-name="ce13" office:value-type="float" office:value="9494917731" calcext:value-type="float">
            <text:p>9494917731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5" calcext:value-type="float">
            <text:p>5241401045</text:p>
          </table:table-cell>
          <table:table-cell table:style-name="ce5" office:value-type="string" calcext:value-type="string">
            <text:p>GURI BHARGAVA</text:p>
          </table:table-cell>
          <table:table-cell table:style-name="ce13" office:value-type="float" office:value="9032011379" calcext:value-type="float">
            <text:p>903201137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6" calcext:value-type="float">
            <text:p>5241401046</text:p>
          </table:table-cell>
          <table:table-cell table:style-name="ce5" office:value-type="string" calcext:value-type="string">
            <text:p>GUTHULA BHANU PRAKASH</text:p>
          </table:table-cell>
          <table:table-cell table:style-name="ce13" office:value-type="float" office:value="9052527622" calcext:value-type="float">
            <text:p>9052527622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7" calcext:value-type="float">
            <text:p>5241401047</text:p>
          </table:table-cell>
          <table:table-cell table:style-name="ce5" office:value-type="string" calcext:value-type="string">
            <text:p>KANDIPILLI L V A B CHARAN</text:p>
          </table:table-cell>
          <table:table-cell table:style-name="ce13" office:value-type="float" office:value="9492825669" calcext:value-type="float">
            <text:p>949282566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8" calcext:value-type="float">
            <text:p>5241401048</text:p>
          </table:table-cell>
          <table:table-cell table:style-name="ce5" office:value-type="string" calcext:value-type="string">
            <text:p>KESABOINA DHANUNJAYA SRI PRAKASH</text:p>
          </table:table-cell>
          <table:table-cell table:style-name="ce13" office:value-type="float" office:value="7989061978" calcext:value-type="float">
            <text:p>7989061978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49" calcext:value-type="float">
            <text:p>5241401049</text:p>
          </table:table-cell>
          <table:table-cell table:style-name="ce5" office:value-type="string" calcext:value-type="string">
            <text:p>PILLA MOHAN SAI</text:p>
          </table:table-cell>
          <table:table-cell table:style-name="ce13" office:value-type="float" office:value="9052729704" calcext:value-type="float">
            <text:p>905272970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0" calcext:value-type="float">
            <text:p>5241401050</text:p>
          </table:table-cell>
          <table:table-cell table:style-name="ce5" office:value-type="string" calcext:value-type="string">
            <text:p>REJETI DINESH SARMA</text:p>
          </table:table-cell>
          <table:table-cell table:style-name="ce13" office:value-type="float" office:value="7095883184" calcext:value-type="float">
            <text:p>709588318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1" calcext:value-type="float">
            <text:p>5241401051</text:p>
          </table:table-cell>
          <table:table-cell table:style-name="ce5" office:value-type="string" calcext:value-type="string">
            <text:p>SHAIK NEYAZ </text:p>
          </table:table-cell>
          <table:table-cell table:style-name="ce13" office:value-type="float" office:value="6372064515" calcext:value-type="float">
            <text:p>6372064515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2" calcext:value-type="float">
            <text:p>5241401052</text:p>
          </table:table-cell>
          <table:table-cell table:style-name="ce5" office:value-type="string" calcext:value-type="string">
            <text:p>THIPPALA THOGALAMMA</text:p>
          </table:table-cell>
          <table:table-cell table:style-name="ce13" office:value-type="float" office:value="9542248275" calcext:value-type="float">
            <text:p>9542248275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3" calcext:value-type="float">
            <text:p>5241401053</text:p>
          </table:table-cell>
          <table:table-cell table:style-name="ce5" office:value-type="string" calcext:value-type="string">
            <text:p>TUTA SAI HARISH</text:p>
          </table:table-cell>
          <table:table-cell table:style-name="ce13" office:value-type="float" office:value="9866668514" calcext:value-type="float">
            <text:p>986666851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4" calcext:value-type="float">
            <text:p>5241401054</text:p>
          </table:table-cell>
          <table:table-cell table:style-name="ce5" office:value-type="string" calcext:value-type="string">
            <text:p>UMMIDI SRI ANJALI</text:p>
          </table:table-cell>
          <table:table-cell table:style-name="ce13" office:value-type="float" office:value="9885647472" calcext:value-type="float">
            <text:p>9885647472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5" calcext:value-type="float">
            <text:p>5241401055</text:p>
          </table:table-cell>
          <table:table-cell table:style-name="ce5" office:value-type="string" calcext:value-type="string">
            <text:p>UNGARALA TRISHA</text:p>
          </table:table-cell>
          <table:table-cell table:style-name="ce13" office:value-type="float" office:value="8186810068" calcext:value-type="float">
            <text:p>8186810068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6" calcext:value-type="float">
            <text:p>5241401056</text:p>
          </table:table-cell>
          <table:table-cell table:style-name="ce5" office:value-type="string" calcext:value-type="string">
            <text:p>YAJJALA MOUNIKA</text:p>
          </table:table-cell>
          <table:table-cell table:style-name="ce13" office:value-type="float" office:value="9398012879" calcext:value-type="float">
            <text:p>9398012879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7" calcext:value-type="float">
            <text:p>5241401057</text:p>
          </table:table-cell>
          <table:table-cell table:style-name="ce5" office:value-type="string" calcext:value-type="string">
            <text:p>YAMPALLA PRASANTH</text:p>
          </table:table-cell>
          <table:table-cell table:style-name="ce13" office:value-type="float" office:value="9398983964" calcext:value-type="float">
            <text:p>9398983964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float" office:value="5241401058" calcext:value-type="float">
            <text:p>5241401058</text:p>
          </table:table-cell>
          <table:table-cell table:style-name="ce5" office:value-type="string" calcext:value-type="string">
            <text:p>KOMMA KRISHNA CHAITANYA</text:p>
          </table:table-cell>
          <table:table-cell table:style-name="ce13" office:value-type="float" office:value="9494386802" calcext:value-type="float">
            <text:p>9494386802</text:p>
          </table:table-cell>
          <table:table-cell table:style-name="Default" table:number-columns-repeated="16381"/>
        </table:table-row>
        <table:table-row table:style-name="ro1" table:number-rows-repeated="8">
          <table:table-cell table:number-columns-repeated="3"/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http://sms.platinumsms.co.in/sms/login.s</text:p>
          </table:table-cell>
          <table:table-cell/>
          <table:table-cell table:style-name="Default" table:number-columns-repeated="16381"/>
        </table:table-row>
        <table:table-row table:style-name="ro1" table:number-rows-repeated="1048507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12:32:08.530610709</meta:creation-date>
    <dc:date>2026-07-10T12:32:41.419464904</dc:date>
    <meta:editing-duration>PT34S</meta:editing-duration>
    <meta:editing-cycles>1</meta:editing-cycles>
    <meta:document-statistic meta:table-count="1" meta:cell-count="178" meta:object-count="0"/>
    <meta:generator>LibreOffice/26.2.4.2$Linux_X86_64 LibreOffice_project/3346a99e6b841765b75a9b29714a5b95c6761ce3</meta:generator>
  </office:meta>
</office:document-meta>
</file>